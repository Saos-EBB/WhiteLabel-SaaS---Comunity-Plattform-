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2220000024E44BE97A0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0.538cm" svg:x="0.751cm" svg:y="3.712cm">
          <draw:image xlink:href="Pictures/1000000100002220000024E44BE97A0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3T14:17:38.998455500</meta:creation-date>
    <dc:date>2026-04-13T14:24:39.883693300</dc:date>
    <meta:editing-duration>PT7M1S</meta:editing-duration>
    <meta:editing-cycles>1</meta:editing-cycles>
    <meta:document-statistic meta:object-count="1"/>
    <meta:generator>LibreOffice/26.2.0.3$Windows_X86_64 LibreOffice_project/620$Build-3</meta:generator>
  </office:meta>
</office:document-meta>
</file>